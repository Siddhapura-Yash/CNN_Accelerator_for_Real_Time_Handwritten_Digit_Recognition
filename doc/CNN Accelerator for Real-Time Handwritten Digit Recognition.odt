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D0000004E2A7203B8.png" manifest:media-type="image/png"/>
  <manifest:file-entry manifest:full-path="Pictures/10000001000002AB0000028D13A7206F.png" manifest:media-type="image/png"/>
  <manifest:file-entry manifest:full-path="Pictures/10000001000002450000020986E85DBD.png" manifest:media-type="image/png"/>
  <manifest:file-entry manifest:full-path="Pictures/100000010000030D00000035A48A53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in" style:contextual-spacing="false" fo:text-align="start" style:justify-single-word="false"/>
      <style:text-properties fo:font-size="16pt" fo:font-weight="normal" officeooo:rsid="0002dc19" officeooo:paragraph-rsid="0002dc19" style:font-size-asian="16pt" style:font-weight-asian="normal" style:font-size-complex="16pt" style:font-weight-complex="normal"/>
    </style:style>
    <style:style style:name="P2" style:family="paragraph" style:parent-style-name="Quotations">
      <style:paragraph-properties fo:margin-top="0in" fo:margin-bottom="0in" style:contextual-spacing="false" fo:text-align="start" style:justify-single-word="false"/>
      <style:text-properties fo:font-size="16pt" fo:font-weight="normal" officeooo:rsid="0002dc19" officeooo:paragraph-rsid="0002dc19" style:font-size-asian="16pt" style:font-weight-asian="normal" style:font-size-complex="16pt" style:font-weight-complex="normal"/>
    </style:style>
    <style:style style:name="P3" style:family="paragraph" style:parent-style-name="Quotations">
      <style:text-properties fo:font-size="16pt" fo:font-weight="normal" officeooo:rsid="0002dc19" officeooo:paragraph-rsid="0002dc19" style:font-size-asian="16pt" style:font-weight-asian="normal" style:font-size-complex="16pt" style:font-weight-complex="normal"/>
    </style:style>
    <style:style style:name="P4" style:family="paragraph" style:parent-style-name="Quotations">
      <style:paragraph-properties fo:break-before="page"/>
      <style:text-properties fo:font-size="16pt" fo:font-weight="normal" officeooo:rsid="0002dc19" officeooo:paragraph-rsid="0002dc19" style:font-size-asian="16pt" style:font-weight-asian="normal" style:font-size-complex="16pt" style:font-weight-complex="normal"/>
    </style:style>
    <style:style style:name="P5" style:family="paragraph" style:parent-style-name="Quotations">
      <style:paragraph-properties fo:margin-top="0in" fo:margin-bottom="0in" style:contextual-spacing="false" fo:text-align="start" style:justify-single-word="false"/>
      <style:text-properties fo:font-size="16pt" fo:font-weight="normal" officeooo:rsid="000359cc" officeooo:paragraph-rsid="000359cc" style:font-size-asian="16pt" style:font-weight-asian="normal" style:font-size-complex="16pt" style:font-weight-complex="normal"/>
    </style:style>
    <style:style style:name="P6" style:family="paragraph" style:parent-style-name="Quotations">
      <style:paragraph-properties fo:margin-top="0in" fo:margin-bottom="0in" style:contextual-spacing="false"/>
      <style:text-properties fo:font-size="16pt" fo:font-weight="bold" officeooo:rsid="0002dc19" officeooo:paragraph-rsid="0002dc19" style:font-size-asian="16pt" style:font-weight-asian="bold" style:font-size-complex="16pt" style:font-weight-complex="bold"/>
    </style:style>
    <style:style style:name="P7" style:family="paragraph" style:parent-style-name="Quotations">
      <style:paragraph-properties fo:margin-top="0in" fo:margin-bottom="0in" style:contextual-spacing="false" fo:text-align="start" style:justify-single-word="false"/>
      <style:text-properties officeooo:paragraph-rsid="0002dc19"/>
    </style:style>
    <style:style style:name="P8" style:family="paragraph" style:parent-style-name="Quotations">
      <style:paragraph-properties fo:margin-top="0in" fo:margin-bottom="0in" style:contextual-spacing="false" fo:text-align="start" style:justify-single-word="false"/>
      <style:text-properties officeooo:paragraph-rsid="000359cc"/>
    </style:style>
    <style:style style:name="P9" style:family="paragraph" style:parent-style-name="Quotations">
      <style:paragraph-properties fo:margin-top="0in" fo:margin-bottom="0in" style:contextual-spacing="false" fo:text-align="start" style:justify-single-word="false"/>
      <style:text-properties officeooo:paragraph-rsid="00038f94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038f94"/>
    </style:style>
    <style:style style:name="P11" style:family="paragraph" style:parent-style-name="Preformatted_20_Text">
      <style:paragraph-properties fo:line-height="100%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Quotations">
      <style:text-properties fo:font-size="22pt" fo:font-weight="bold" officeooo:rsid="0002dc19" officeooo:paragraph-rsid="0002dc19" style:font-size-asian="22pt" style:font-weight-asian="bold" style:font-size-complex="22pt" style:font-weight-complex="bold"/>
    </style:style>
    <style:style style:name="P14" style:family="paragraph" style:parent-style-name="Quotations">
      <style:paragraph-properties fo:margin-top="0in" fo:margin-bottom="0in" style:contextual-spacing="false" fo:text-align="start" style:justify-single-word="false"/>
      <style:text-properties officeooo:rsid="000359cc" officeooo:paragraph-rsid="000359cc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in" fo:margin-bottom="0.0181in" style:contextual-spacing="false"/>
      <style:text-properties fo:font-weight="bold" style:font-weight-asian="bold" style:font-weight-complex="bold"/>
    </style:style>
    <style:style style:name="P17" style:family="paragraph" style:parent-style-name="Text_20_body">
      <style:text-properties officeooo:paragraph-rsid="00038f94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ext_20_body">
      <style:paragraph-properties fo:break-before="page"/>
      <style:text-properties officeooo:paragraph-rsid="0005ddd4"/>
    </style:style>
    <style:style style:name="P20" style:family="paragraph" style:parent-style-name="Text_20_body">
      <style:text-properties officeooo:paragraph-rsid="0005ddd4"/>
    </style:style>
    <style:style style:name="P21" style:family="paragraph" style:parent-style-name="Text_20_body">
      <style:text-properties officeooo:paragraph-rsid="0007b17b"/>
    </style:style>
    <style:style style:name="P22" style:family="paragraph" style:parent-style-name="Text_20_body">
      <style:text-properties officeooo:rsid="0007b17b" officeooo:paragraph-rsid="0007b17b"/>
    </style:style>
    <style:style style:name="P23" style:family="paragraph" style:parent-style-name="Heading_20_3">
      <style:paragraph-properties fo:margin-top="0in" fo:margin-bottom="0in" style:contextual-spacing="false" fo:text-align="start" style:justify-single-word="false"/>
      <style:text-properties officeooo:paragraph-rsid="0002dc19"/>
    </style:style>
    <style:style style:name="P24" style:family="paragraph" style:parent-style-name="Heading_20_3">
      <style:paragraph-properties fo:break-before="page"/>
      <style:text-properties fo:font-size="26pt" style:font-size-asian="26pt" style:font-size-complex="26pt"/>
    </style:style>
    <style:style style:name="P25" style:family="paragraph" style:parent-style-name="Text_20_body" style:list-style-name="L1">
      <style:text-properties officeooo:paragraph-rsid="0005ddd4"/>
    </style:style>
    <style:style style:name="P26" style:family="paragraph" style:parent-style-name="Text_20_body" style:list-style-name="L2"/>
    <style:style style:name="P27" style:family="paragraph" style:parent-style-name="Text_20_body" style:list-style-name="L2">
      <style:paragraph-properties fo:margin-top="0in" fo:margin-bottom="0in" style:contextual-spacing="false"/>
    </style:style>
    <style:style style:name="P28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59cc" style:font-weight-asian="bold" style:font-weight-complex="bold"/>
    </style:style>
    <style:style style:name="T3" style:family="text">
      <style:text-properties officeooo:rsid="000359cc"/>
    </style:style>
    <style:style style:name="T4" style:family="text">
      <style:text-properties fo:font-size="16pt" officeooo:rsid="0002dc19" style:font-size-asian="16pt" style:font-size-complex="16pt"/>
    </style:style>
    <style:style style:name="T5" style:family="text">
      <style:text-properties fo:font-size="16pt" fo:font-weight="normal" officeooo:rsid="0002dc19" style:font-size-asian="16pt" style:font-weight-asian="normal" style:font-size-complex="16pt" style:font-weight-complex="normal"/>
    </style:style>
    <style:style style:name="T6" style:family="text">
      <style:text-properties fo:font-weight="normal" officeooo:rsid="000359cc" style:font-weight-asian="normal" style:font-weight-complex="normal"/>
    </style:style>
    <style:style style:name="T7" style:family="text">
      <style:text-properties officeooo:rsid="0005ddd4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fo:font-weight="normal" officeooo:rsid="0007b17b" style:font-size-asian="10.5pt" style:font-weight-asian="normal" style:font-size-complex="12pt" style:font-weight-complex="normal"/>
    </style:style>
    <style:style style:name="T10" style:family="text">
      <style:text-properties fo:font-size="12pt" fo:font-weight="bold" officeooo:rsid="0007b17b" style:font-size-asian="10.5pt" style:font-weight-asian="bold" style:font-size-complex="12pt" style:font-weight-complex="bold"/>
    </style:style>
    <style:style style:name="T1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4744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FPGA-based CNN Accelerator for Real-Time Handwritten Digit Recognition</text:p>
      <text:p text:style-name="P13"/>
      <text:p text:style-name="P3"/>
      <text:p text:style-name="P4">CNN consists of the following major stages:</text:p>
      <text:p text:style-name="P3">1. Convolution Layer</text:p>
      <text:p text:style-name="P3">2. ReLU Activation Layer</text:p>
      <text:p text:style-name="P3">3. Max-Pooling Layer</text:p>
      <text:p text:style-name="P3">4. Fully Connected (Dense) Layer</text:p>
      <text:p text:style-name="P3">5. Argmax Output Layer</text:p>
      <text:p text:style-name="P3"/>
      <text:p text:style-name="P3">Input image size (grayscale image) = 28 x 28</text:p>
      <text:p text:style-name="P3">→ Convolution (16 kernels of size 3×3)</text:p>
      <text:p text:style-name="P3">→ ReLU Activation</text:p>
      <text:p text:style-name="P3">→ Max Pooling (2×2)</text:p>
      <text:p text:style-name="P3">→ Flattening</text:p>
      <text:p text:style-name="P3">→ Fully Connected Layer</text:p>
      <text:p text:style-name="P3">→ Argmax Classification Output</text:p>
      <text:p text:style-name="P4"><text:span text:style-name="T1">Convolution layer :</text:span> purpose is to extract meaningful features such as edges, curves, and patterns from the input image.</text:p>
      <text:p text:style-name="P6">We are gonna use :</text:p>
      <text:p text:style-name="P2">16 convolution kernels</text:p>
      <text:p text:style-name="P2">Kernel size = 3 × 3</text:p>
      <text:p text:style-name="P2">Stride = 1</text:p>
      <text:p text:style-name="P2">No padding</text:p>
      <text:p text:style-name="P2"/>
      <text:p text:style-name="P5">we have 28x28 image and kernel size is 3 </text:p>
      <text:p text:style-name="P5">so 0 to 27 is width = height of the image</text:p>
      <text:p text:style-name="P5"/>
      <text:p text:style-name="P5">if we slides our filter on image then last valid pixel can go till 25 as 25 26 27 this value will be fetched by our 3x3 kernel</text:p>
      <text:p text:style-name="P5">so after kernel operation we will get 26*26 feature map for each kernel [0-25 in total 26]</text:p>
      <text:p text:style-name="P2"/>
      <text:p text:style-name="P2">Each kernel slides across the 28 × 28 input image and performs element-wise MAC operation.</text:p>
      <text:p text:style-name="P2"/>
      <text:p text:style-name="P2">Mathematically convolution : </text:p>
      <text:h text:style-name="P1" text:outline-level="2"><draw:frame draw:style-name="fr1" draw:name="Image1" text:anchor-type="char" svg:x="0.4835in" svg:y="0.2063in" svg:width="5.9055in" svg:height="0.4008in" draw:z-index="0"><draw:image xlink:href="Pictures/100000010000030D00000035A48A532D.png" xlink:type="simple" xlink:show="embed" xlink:actuate="onLoad" draw:mime-type="image/png"/></draw:frame><text:span text:style-name="Strong_20_Emphasis"/></text:h>
      <text:h text:style-name="P1" text:outline-level="2"><text:span text:style-name="Strong_20_Emphasis"/></text:h>
      <text:h text:style-name="P23" text:outline-level="3"><text:span text:style-name="Strong_20_Emphasis"><text:span text:style-name="T4"><text:tab/>Y(i,j) : </text:span></text:span>This is the <text:span text:style-name="Strong_20_Emphasis">output value</text:span> at position <text:span text:style-name="Strong_20_Emphasis">(i,j)</text:span>.</text:h>
      <text:p text:style-name="P7"><text:span text:style-name="T5"><text:s/><text:tab/></text:span>i = row number<text:line-break/> <text:tab/>j = column number</text:p>
      <text:p text:style-name="P14"><text:span text:style-name="T1"/></text:p>
      <text:p text:style-name="P8"><text:span text:style-name="T2">X</text:span><text:span text:style-name="T3"> = image input</text:span></text:p>
      <text:p text:style-name="P8"><text:span text:style-name="T2">W </text:span><text:span text:style-name="T3">= Filter / Kernel<text:tab/>[</text:span>filter checks for some feature (like vertical edge, <text:span text:style-name="T3">shape</text:span>).<text:span text:style-name="T3">]</text:span></text:p>
      <text:p text:style-name="P8"><text:span text:style-name="T1">b </text:span><text:span text:style-name="T2">= </text:span><text:span text:style-name="T6">bias [extra number added to end]<text:tab/>final answer = sum + bias</text:span></text:p>
      <text:p text:style-name="P8"><text:span text:style-name="T2">K</text:span><text:span text:style-name="T6"> = filter size</text:span></text:p>
      <text:p text:style-name="P9"><text:span text:style-name="T2">m</text:span><text:span text:style-name="T6"> = row inside filter<text:line-break/></text:span><text:span text:style-name="T2">n </text:span><text:span text:style-name="T6">= column inside filter</text:span></text:p>
      <text:p text:style-name="P9"><text:span text:style-name="T6"/></text:p>
      <text:p text:style-name="P10"><text:span text:style-name="T6"><text:tab/></text:span><text:span text:style-name="T2">This is the image patch:</text:span></text:p>
      <text:p text:style-name="P15"><text:tab/>X(i+m,j+n)<text:span text:style-name="T3"><text:tab/></text:span></text:p>
      <text:h text:style-name="P24" text:outline-level="3" text:is-list-header="true">Steps to perform convolution</text:h>
      <text:p text:style-name="P12"><text:span text:style-name="Strong_20_Emphasis"/></text:p>
      <text:p text:style-name="P12"><text:span text:style-name="Strong_20_Emphasis">1. Place filter on image</text:span><text:line-break/>Choose output position <text:span text:style-name="Strong_20_Emphasis">(i,j)</text:span> and place kernel there.</text:p>
      <text:p text:style-name="P12"/>
      <text:p text:style-name="P12"><text:span text:style-name="Strong_20_Emphasis">2. Take image patch</text:span><text:line-break/>Pick the same-sized patch from image.</text:p>
      <text:p text:style-name="P12">Example for 3×3 filter:</text:p>
      <text:p text:style-name="P11"><text:span text:style-name="Source_20_Text">3×3 image patch</text:span></text:p>
      <text:p text:style-name="P12"><text:span text:style-name="Strong_20_Emphasis"/></text:p>
      <text:p text:style-name="P12"><text:span text:style-name="Strong_20_Emphasis">3. Multiply matching values</text:span><text:line-break/>Multiply each image pixel with corresponding filter value.</text:p>
      <text:p text:style-name="Preformatted_20_Text"><text:span text:style-name="Source_20_Text">pixel × weight</text:span></text:p>
      <text:p text:style-name="Text_20_body"><text:span text:style-name="Strong_20_Emphasis"/></text:p>
      <text:p text:style-name="Text_20_body"><text:span text:style-name="Strong_20_Emphasis">4. Add all products</text:span><text:line-break/>Sum all multiplied values.</text:p>
      <text:p text:style-name="Preformatted_20_Text"><text:span text:style-name="Source_20_Text">Σ (all products)</text:span></text:p>
      <text:p text:style-name="Text_20_body"><text:span text:style-name="Strong_20_Emphasis"/></text:p>
      <text:p text:style-name="Text_20_body"><text:span text:style-name="Strong_20_Emphasis">5. Add bias</text:span><text:line-break/>Add one extra constant.</text:p>
      <text:p text:style-name="Preformatted_20_Text"><text:span text:style-name="Source_20_Text">sum + b</text:span></text:p>
      <text:p text:style-name="P17"><text:span text:style-name="Strong_20_Emphasis"/></text:p>
      <text:p text:style-name="P17"><text:span text:style-name="Strong_20_Emphasis">6. Store output</text:span><text:line-break/>This becomes:</text:p>
      <text:p text:style-name="Preformatted_20_Text"><text:span text:style-name="Source_20_Text">Y(i,j)</text:span></text:p>
      <text:p text:style-name="Text_20_body">one output pixel.</text:p>
      <text:p text:style-name="Text_20_body"><text:span text:style-name="Strong_20_Emphasis"/></text:p>
      <text:p text:style-name="Text_20_body"><text:span text:style-name="Strong_20_Emphasis">7. Slide filter</text:span><text:line-break/>Move filter right by 1.</text:p>
      <text:p text:style-name="Text_20_body">Repeat steps 2–6.</text:p>
      <text:p text:style-name="Text_20_body"><text:span text:style-name="Strong_20_Emphasis"/></text:p>
      <text:p text:style-name="Text_20_body"><text:span text:style-name="Strong_20_Emphasis">8. Complete entire image</text:span><text:line-break/>After scanning all valid positions, output feature map is ready.</text:p>
      <text:p text:style-name="Text_20_body"/>
      <text:p text:style-name="P19"><text:span text:style-name="T7">ReLU : </text:span>Remove negative values.</text:p>
      <text:list text:style-name="L1">
        <text:list-item>
          <text:p text:style-name="P25">if x &gt; 0 → keep it </text:p>
        </text:list-item>
        <text:list-item>
          <text:p text:style-name="P25">if x &lt; 0 → make it 0</text:p>
        </text:list-item>
      </text:list>
      <text:p text:style-name="P20">negative activations are usually not useful for feature detection</text:p>
      <text:p text:style-name="P20"/>
      <text:p text:style-name="P20"><draw:frame draw:style-name="fr1" draw:name="Image3" text:anchor-type="char" svg:x="3.5209in" svg:y="0.6016in" svg:width="3.3819in" svg:height="3.0327in" draw:z-index="2"><draw:image xlink:href="Pictures/10000001000002450000020986E85DBD.png" xlink:type="simple" xlink:show="embed" xlink:actuate="onLoad" draw:mime-type="image/png"/></draw:frame><text:span text:style-name="T7">Max-Pooling : </text:span>Take a small region and keep only the largest value.</text:p>
      <text:p text:style-name="P20"/>
      <text:p text:style-name="P20"><draw:frame draw:style-name="fr2" draw:name="Image2" text:anchor-type="char" svg:x="-0.0563in" svg:y="-0.0016in" svg:width="3.4102in" svg:height="4.1134in" draw:z-index="1"><draw:image xlink:href="Pictures/10000001000002AB0000028D13A7206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7">Max pooling </text:span>reduces feature map size.</text:p>
      <text:p text:style-name="P20">26×26<text:line-break/>↓<text:line-break/>13×13</text:p>
      <text:p text:style-name="P20"/>
      <text:p text:style-name="P16">Input<text:tab/><text:tab/><text:tab/>: <text:s text:c="11"/>28×28×1</text:p>
      <text:p text:style-name="P16">Conv(16,3×3)<text:tab/><text:tab/>: <text:s text:c="4"/><text:tab/> <text:s/>26×26×16</text:p>
      <text:p text:style-name="P16">ReLU<text:tab/><text:tab/><text:tab/>: <text:s text:c="11"/>26×26×16</text:p>
      <text:p text:style-name="P16">MaxPool(2×2)<text:tab/>: <text:s text:c="4"/><text:tab/> 13×13×16</text:p>
      <text:p text:style-name="P16">Flatten<text:tab/><text:tab/>: <text:s text:c="10"/>2704</text:p>
      <text:p text:style-name="P16">Fully Connected<text:tab/>: <text:s/><text:tab/>10</text:p>
      <text:p text:style-name="P16">Argmax<text:tab/><text:tab/>: <text:s text:c="10"/>predicted digit</text:p>
      <text:p text:style-name="Text_20_body"><text:span text:style-name="Strong_20_Emphasis"><text:span text:style-name="T8"/></text:span></text:p>
      <text:p text:style-name="P21"><text:soft-page-break/><text:span text:style-name="Strong_20_Emphasis"><text:span text:style-name="T9">output of pooling layer converted into flatten 1-D vector and passed it to fully connected layer (dense layer) which decides digits 0 to 9 by calculating weighted sum for each neuron</text:span></text:span></text:p>
      <text:p text:style-name="P21"><text:span text:style-name="Strong_20_Emphasis"><text:span text:style-name="T10"/></text:span></text:p>
      <text:p text:style-name="P21"><text:span text:style-name="Strong_20_Emphasis"><text:span text:style-name="T10">Dense layer formula :</text:span></text:span></text:p>
      <text:p text:style-name="P21"><draw:frame draw:style-name="fr1" draw:name="Image4" text:anchor-type="char" svg:x="0.9717in" svg:y="0.048in" svg:width="3.3689in" svg:height="0.6362in" draw:z-index="3"><draw:image xlink:href="Pictures/100000010000019D0000004E2A7203B8.png" xlink:type="simple" xlink:show="embed" xlink:actuate="onLoad" draw:mime-type="image/png"/></draw:frame><text:span text:style-name="Strong_20_Emphasis"><text:span text:style-name="T10"/></text:span></text:p>
      <text:p text:style-name="P21"><text:span text:style-name="Strong_20_Emphasis"><text:span text:style-name="T10"/></text:span></text:p>
      <text:p text:style-name="P21"><text:span text:style-name="Strong_20_Emphasis"><text:span text:style-name="T10"/></text:span></text:p>
      <text:p text:style-name="P21"><text:span text:style-name="Strong_20_Emphasis"><text:span text:style-name="T10">Where:</text:span></text:span></text:p>
      <text:list text:style-name="L2">
        <text:list-item>
          <text:p text:style-name="P27"><text:span text:style-name="Strong_20_Emphasis">i = 0 to N-1</text:span> → go through all inputs </text:p>
        </text:list-item>
        <text:list-item>
          <text:p text:style-name="P27"><text:span text:style-name="Strong_20_Emphasis">xᵢ</text:span> → input feature </text:p>
        </text:list-item>
        <text:list-item>
          <text:p text:style-name="P27"><text:span text:style-name="Strong_20_Emphasis">wᵢ</text:span> → corresponding weight </text:p>
        </text:list-item>
        <text:list-item>
          <text:p text:style-name="P27"><text:span text:style-name="Strong_20_Emphasis">b</text:span> → bias </text:p>
        </text:list-item>
        <text:list-item>
          <text:p text:style-name="P27"><text:span text:style-name="Strong_20_Emphasis">y</text:span> → output score </text:p>
        </text:list-item>
        <text:list-item>
          <text:p text:style-name="P26"><text:span text:style-name="Strong_20_Emphasis">N</text:span> → total flattened inputs</text:p>
        </text:list-item>
      </text:list>
      <text:p text:style-name="Text_20_body"/>
      <text:p text:style-name="P22">after this there will be arg max function which will pick max value out of 10 given by dense layer</text:p>
      <text:p text:style-name="P21"><text:span text:style-name="Strong_20_Emphasis"><text:span text:style-name="T10"/></text:span></text:p>
      <text:p text:style-name="P18"><text:span text:style-name="Strong_20_Emphasis"><text:span text:style-name="T11">CNN Calculation for 28×28 Input Image</text:span></text:span></text:p>
      <text:p text:style-name="Text_20_body"><text:span text:style-name="Strong_20_Emphasis">Assumptions:</text:span></text:p>
      <text:list text:style-name="L3">
        <text:list-item>
          <text:p text:style-name="P28">Input image = 28 × 28</text:p>
        </text:list-item>
        <text:list-item>
          <text:p text:style-name="P28">Number of kernels = 16</text:p>
        </text:list-item>
        <text:list-item>
          <text:p text:style-name="P28">Kernel size = 3 × 3</text:p>
        </text:list-item>
        <text:list-item>
          <text:p text:style-name="P28">Stride = 1</text:p>
        </text:list-item>
        <text:list-item>
          <text:p text:style-name="P28">No padding</text:p>
        </text:list-item>
        <text:list-item>
          <text:p text:style-name="P28">Max Pooling = 2 × 2</text:p>
        </text:list-item>
      </text:list>
      <text:h text:style-name="Heading_20_3" text:outline-level="3" text:is-list-header="true"/>
      <text:h text:style-name="Heading_20_3" text:outline-level="3">Step 1: Input Layer</text:h>
      <text:p text:style-name="Text_20_body">Input image size: <text:span text:style-name="Strong_20_Emphasis">28 × 28 × 1</text:span></text:p>
      <text:p text:style-name="Text_20_body">(1 channel because grayscale image)</text:p>
      <text:p text:style-name="Text_20_body">Total input pixels:<text:line-break/>28 × 28 = <text:span text:style-name="Strong_20_Emphasis">784</text:span></text:p>
      <text:h text:style-name="Heading_20_3" text:outline-level="3" text:is-list-header="true"/>
      <text:h text:style-name="Heading_20_3" text:outline-level="3">Step 2: Convolution Output Size</text:h>
      <text:p text:style-name="Text_20_body">Formula:<text:line-break/>Output size = N − K + 1</text:p>
      <text:p text:style-name="Text_20_body">Where:<text:line-break/>N = 28<text:line-break/>K = 3</text:p>
      <text:p text:style-name="Text_20_body">Output:<text:line-break/>28 − 3 + 1 = <text:span text:style-name="Strong_20_Emphasis">26</text:span></text:p>
      <text:p text:style-name="Text_20_body">Each kernel produces:<text:line-break/><text:span text:style-name="Strong_20_Emphasis">26 × 26</text:span></text:p>
      <text:p text:style-name="Text_20_body">Since there are 16 kernels:</text:p>
      <text:p text:style-name="Text_20_body">Convolution output:<text:line-break/><text:span text:style-name="Strong_20_Emphasis">26 × 26 × 16</text:span></text:p>
      <text:p text:style-name="Text_20_body">Total output values:<text:line-break/>26 × 26 × 16 = <text:span text:style-name="Strong_20_Emphasis">10,816</text:span></text:p>
      <text:h text:style-name="Heading_20_3" text:outline-level="3" text:is-list-header="true"><text:soft-page-break/></text:h>
      <text:h text:style-name="Heading_20_3" text:outline-level="3">Step 3: Convolution Weights</text:h>
      <text:p text:style-name="Text_20_body">Each kernel size:<text:line-break/>3 × 3 = <text:span text:style-name="Strong_20_Emphasis">9 weights</text:span></text:p>
      <text:p text:style-name="Text_20_body">Add 1 bias per kernel:<text:line-break/>9 + 1 = <text:span text:style-name="Strong_20_Emphasis">10 parameters</text:span></text:p>
      <text:p text:style-name="Text_20_body">For 16 kernels:</text:p>
      <text:p text:style-name="Text_20_body">Weights:<text:line-break/>16 × 9 = <text:span text:style-name="Strong_20_Emphasis">144</text:span></text:p>
      <text:p text:style-name="Text_20_body">Biases:<text:line-break/>16</text:p>
      <text:p text:style-name="Text_20_body">Total convolution parameters:<text:line-break/><text:span text:style-name="Strong_20_Emphasis">160</text:span></text:p>
      <text:h text:style-name="Heading_20_3" text:outline-level="3" text:is-list-header="true"/>
      <text:h text:style-name="Heading_20_3" text:outline-level="3">Step 4: ReLU Activation</text:h>
      <text:p text:style-name="Text_20_body">ReLU does not change size.</text:p>
      <text:p text:style-name="Text_20_body">Output remains:<text:line-break/><text:span text:style-name="Strong_20_Emphasis">26 × 26 × 16</text:span></text:p>
      <text:h text:style-name="Heading_20_3" text:outline-level="3" text:is-list-header="true"/>
      <text:h text:style-name="Heading_20_3" text:outline-level="3">Step 5: Max Pooling</text:h>
      <text:p text:style-name="Text_20_body">Pooling size: <text:span text:style-name="Strong_20_Emphasis">2 × 2</text:span></text:p>
      <text:p text:style-name="Text_20_body">Output size:<text:line-break/>26 ÷ 2 = <text:span text:style-name="Strong_20_Emphasis">13</text:span></text:p>
      <text:p text:style-name="Text_20_body">After pooling:<text:line-break/><text:span text:style-name="Strong_20_Emphasis">13 × 13 × 16</text:span></text:p>
      <text:p text:style-name="Text_20_body">Total pooled outputs:<text:line-break/>13 × 13 × 16 = <text:span text:style-name="Strong_20_Emphasis">2704</text:span></text:p>
      <text:h text:style-name="Heading_20_3" text:outline-level="3" text:is-list-header="true"/>
      <text:h text:style-name="Heading_20_3" text:outline-level="3">Step 6: Flatten Layer</text:h>
      <text:p text:style-name="Text_20_body">Convert:<text:line-break/>13 × 13 × 16</text:p>
      <text:p text:style-name="Text_20_body">Into 1D vector:</text:p>
      <text:p text:style-name="Text_20_body">13 × 13 × 16 = <text:span text:style-name="Strong_20_Emphasis">2704 inputs</text:span></text:p>
      <text:h text:style-name="Heading_20_3" text:outline-level="3" text:is-list-header="true"><text:soft-page-break/>Step 7: Fully Connected Layer</text:h>
      <text:p text:style-name="Text_20_body">Output neurons = <text:span text:style-name="Strong_20_Emphasis">10</text:span><text:line-break/>(for digits 0 to 9)</text:p>
      <text:p text:style-name="Text_20_body">Weights required:<text:line-break/>2704 × 10 = <text:span text:style-name="Strong_20_Emphasis">27,040</text:span></text:p>
      <text:p text:style-name="Text_20_body">Biases:<text:line-break/>10</text:p>
      <text:p text:style-name="Text_20_body">Total FC parameters:<text:line-break/><text:span text:style-name="Strong_20_Emphasis">27,050</text:span></text:p>
      <text:h text:style-name="Heading_20_3" text:outline-level="3" text:is-list-header="true"/>
      <text:h text:style-name="Heading_20_3" text:outline-level="3">Step 8: Total Network Parameters</text:h>
      <text:p text:style-name="Text_20_body">Convolution layer: <text:span text:style-name="Strong_20_Emphasis">160</text:span></text:p>
      <text:p text:style-name="Text_20_body">Fully connected layer: <text:span text:style-name="Strong_20_Emphasis">27,050</text:span></text:p>
      <text:p text:style-name="Text_20_body">Total parameters:<text:line-break/><text:span text:style-name="Strong_20_Emphasis">27,210</text:span></text:p>
      <text:h text:style-name="Heading_20_3" text:outline-level="3" text:is-list-header="true"/>
      <text:h text:style-name="Heading_20_3" text:outline-level="3">Step 9: Computations</text:h>
      <text:p text:style-name="Text_20_body">Each output neuron performs:<text:line-break/><text:span text:style-name="Strong_20_Emphasis">2704 multiplications</text:span></text:p>
      <text:p text:style-name="Text_20_body">For 10 neurons:</text:p>
      <text:p text:style-name="Text_20_body">2704 × 10 = <text:span text:style-name="Strong_20_Emphasis">27,040 MAC operations</text:span></text:p>
      <text:h text:style-name="Heading_20_3" text:outline-level="3" text:is-list-header="true"/>
      <text:h text:style-name="Heading_20_3" text:outline-level="3">Step 10: Final Output</text:h>
      <text:p text:style-name="Text_20_body">The fully connected layer produces <text:span text:style-name="Strong_20_Emphasis">10 scores</text:span></text:p>
      <text:p text:style-name="Text_20_body">Example:<text:line-break/>[3, 12, 8, 45, 7, 2, 10, 5, 1, 6]</text:p>
      <text:p text:style-name="Text_20_body">Argmax selects highest value: <text:span text:style-name="Strong_20_Emphasis">45</text:span></text:p>
      <text:p text:style-name="Text_20_body">Index = <text:span text:style-name="Strong_20_Emphasis">3</text:span></text:p>
      <text:p text:style-name="Text_20_body">Predicted digit: <text:span text:style-name="Strong_20_Emphasis">3</text:span></text:p>
      <text:h text:style-name="Heading_20_3" text:outline-level="3" text:is-list-header="true"><text:soft-page-break/></text:h>
      <text:h text:style-name="Heading_20_3" text:outline-level="3">Final CNN Architecture</text:h>
      <text:p text:style-name="Text_20_body">Input: 28 × 28 × 1<text:line-break/>Convolution (16 filters, 3×3): 26 × 26 × 16<text:line-break/>ReLU: 26 × 26 × 16<text:line-break/>Max Pooling (2×2): 13 × 13 × 16<text:line-break/>Flatten: 2704<text:line-break/>Fully Connected: 10<text:line-break/>Argmax: Predicted Digit</text:p>
      <text:p text:style-name="P18">28x28 Image</text:p>
      <text:p text:style-name="Text_20_body"><text:s text:c="4"/>↓</text:p>
      <text:p text:style-name="Text_20_body">3x3 Conv (16 filters)</text:p>
      <text:p text:style-name="Text_20_body"><text:s text:c="4"/>↓</text:p>
      <text:p text:style-name="Text_20_body">26x26x16</text:p>
      <text:p text:style-name="Text_20_body"><text:s text:c="4"/>↓</text:p>
      <text:p text:style-name="Text_20_body">ReLU</text:p>
      <text:p text:style-name="Text_20_body"><text:s text:c="4"/>↓</text:p>
      <text:p text:style-name="Text_20_body">2x2 MaxPool</text:p>
      <text:p text:style-name="Text_20_body"><text:s text:c="4"/>↓</text:p>
      <text:p text:style-name="Text_20_body">13x13x16</text:p>
      <text:p text:style-name="Text_20_body"><text:s text:c="4"/>↓</text:p>
      <text:p text:style-name="Text_20_body">Flatten</text:p>
      <text:p text:style-name="Text_20_body"><text:s text:c="4"/>↓</text:p>
      <text:p text:style-name="Text_20_body">2704 values</text:p>
      <text:p text:style-name="Text_20_body"><text:s text:c="4"/>↓</text:p>
      <text:p text:style-name="Text_20_body">Dense (10 neurons)</text:p>
      <text:p text:style-name="Text_20_body"><text:s text:c="4"/>↓</text:p>
      <text:p text:style-name="Text_20_body">Digit 0-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21:04:54.946426850</meta:creation-date>
    <dc:date>2026-06-16T23:38:06.357752906</dc:date>
    <meta:editing-duration>PT16M47S</meta:editing-duration>
    <meta:editing-cycles>3</meta:editing-cycles>
    <meta:generator>LibreOffice/24.2.7.2$Linux_X86_64 LibreOffice_project/420$Build-2</meta:generator>
    <meta:document-statistic meta:table-count="0" meta:image-count="4" meta:object-count="0" meta:page-count="11" meta:paragraph-count="155" meta:word-count="924" meta:character-count="4731" meta:non-whitespace-character-count="3861"/>
  </office:meta>
</office:document-meta>
</file>